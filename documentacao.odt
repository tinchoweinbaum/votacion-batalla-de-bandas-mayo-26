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onsolas" style:text-underline-style="solid" style:text-underline-width="auto" style:text-underline-color="font-color" fo:font-weight="bold" officeooo:rsid="00100903" officeooo:paragraph-rsid="00100903" style:font-weight-asian="bold" style:font-weight-complex="bold"/>
    </style:style>
    <style:style style:name="P2" style:family="paragraph" style:parent-style-name="Standard">
      <style:paragraph-properties fo:text-align="start" style:justify-single-word="false"/>
      <style:text-properties style:font-name="Consolas" style:text-underline-style="none" fo:font-weight="normal" officeooo:rsid="00100903" officeooo:paragraph-rsid="00100903" style:font-weight-asian="normal" style:font-weight-complex="normal"/>
    </style:style>
    <style:style style:name="P3" style:family="paragraph" style:parent-style-name="Standard">
      <style:paragraph-properties fo:text-align="start" style:justify-single-word="false"/>
      <style:text-properties style:font-name="Consolas" style:text-underline-style="none" fo:font-weight="bold" officeooo:rsid="00100903" officeooo:paragraph-rsid="00100903" style:font-weight-asian="bold" style:font-weight-complex="bold"/>
    </style:style>
    <style:style style:name="P4" style:family="paragraph" style:parent-style-name="Standard">
      <style:paragraph-properties fo:text-align="start" style:justify-single-word="false"/>
      <style:text-properties style:font-name="Consolas" fo:font-style="italic" style:text-underline-style="none" fo:font-weight="normal" officeooo:rsid="00100903" officeooo:paragraph-rsid="00100903"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style:font-name="Consolas" style:text-underline-style="none" fo:font-weight="normal" officeooo:rsid="00101f53" officeooo:paragraph-rsid="00101f53" style:font-weight-asian="normal" style:font-weight-complex="normal"/>
    </style:style>
    <style:style style:name="T1" style:family="text">
      <style:text-properties officeooo:rsid="001150b8"/>
    </style:style>
    <style:style style:name="T2" style:family="text">
      <style:text-properties fo:font-weight="normal" style:font-weight-asian="normal" style:font-weight-complex="normal"/>
    </style:style>
    <style:style style:name="T3" style:family="text">
      <style:text-properties officeooo:rsid="00101f5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talla de bandas 25/5/26</text:p>
      <text:p text:style-name="P1"/>
      <text:p text:style-name="P2">El proyecto se maneja con una app de flask corriendo en python en un servidor remoto <text:span text:style-name="T1">(vm de google cloud)</text:span>. Este servidor va a hostear la base de datos relacional en la que se almacena toda la información sobre los votos y las bandas.</text:p>
      <text:p text:style-name="P2"/>
      <text:p text:style-name="P3">Base de datos: <text:span text:style-name="T2">sqlite3 porque es un proyecto muy simple. Consiste de 2 tablas:</text:span></text:p>
      <text:p text:style-name="P2"/>
      <text:p text:style-name="P4">→bandas_participantes</text:p>
      <text:p text:style-name="P4">→votos</text:p>
      <text:p text:style-name="P2"/>
      <text:p text:style-name="P2"><text:span text:style-name="T3">La tabla </text:span>bandas_participantes <text:span text:style-name="T3">sirve solamente “para el back-end”, no se utiliza para graficar resultados ni nada de eso. T</text:span>iene 2 campos: id_banda e id_batalla, la pk es la conjunción de estas dos</text:p>
      <text:p text:style-name="P2"/>
      <text:p text:style-name="P4">PRIMARY KEY (batalla_id, banda_id)</text:p>
      <text:p text:style-name="P2"/>
      <text:p text:style-name="P2">Esto es la mejor opción por varios motivos: Permite escalabilidad de manera simple si en algún momento se recicla el sistema para otra fecha y facilita el checkeo de que cuando se emite un voto, la banda a la que se votó participe en la batalla que dice el voto.</text:p>
      <text:p text:style-name="P5">Permite también que una banda participe en más de una batalla.</text:p>
      <text:p text:style-name="P5"/>
      <text:p text:style-name="P5">La tabla votos por otro lado va a ser la tabla principal de la base de datos. Registra los votos a medida que van llegando al sistema. Tiene los siguientes campos: id_voto (pk autoincremental), id_batalla, id_banda, id_dispositivo. Todos los id menos id_voto e id_batalla son texto.</text:p>
      <text:p text:style-name="P5"/>
      <text:p text:style-name="P5">Es mucho mejor tener las 3 batallas “agrupadas” en una sola tabla en vez de tener una batalla por tabla, que puede resultar más natural a la hora de definir la estructura de la database. Esto es por muchos motivos: Simplifica todas las queries que tengan que ver con el total de votos, elimina la necesidad de repetir código en el back para contar los votos de cada tabla de manera separada, reduce los accesos al disco, simplifica al motor de base de datos el trabajo del recorrido del archivo, al no tener 3 indexes distintos (uno por tabl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style:rfc-language-tag="es-419" fo:language="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style:rfc-language-tag="es-419" fo:language="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9T01:18:55.884730400</meta:creation-date>
    <dc:date>2026-05-19T01:58:08.480106700</dc:date>
    <meta:editing-duration>PT17M44S</meta:editing-duration>
    <meta:editing-cycles>1</meta:editing-cycles>
    <meta:document-statistic meta:table-count="0" meta:image-count="0" meta:object-count="0" meta:page-count="1" meta:paragraph-count="11" meta:word-count="306" meta:character-count="1742" meta:non-whitespace-character-count="1447"/>
    <meta:generator>LibreOffice/25.8.5.2$Windows_X86_64 LibreOffice_project/9c8b85f387cc00a89945a79c9e6239f32e450ac2</meta:generator>
  </office:meta>
</office:document-meta>
</file>